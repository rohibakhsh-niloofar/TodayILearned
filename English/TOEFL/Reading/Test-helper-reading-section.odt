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iransans" svg:font-family="iransans"/>
  </office:font-face-decls>
  <office:automatic-styles>
    <style:style style:name="P1" style:family="paragraph" style:parent-style-name="Standard">
      <style:paragraph-properties fo:text-align="center" style:justify-single-word="false"/>
      <style:text-properties style:font-name="Liberation Serif1" fo:font-size="36pt" fo:font-weight="bold" officeooo:rsid="001472c0" officeooo:paragraph-rsid="001472c0" style:font-size-asian="36pt" style:font-weight-asian="bold" style:font-size-complex="36pt" style:font-weight-complex="bold"/>
    </style:style>
    <style:style style:name="P2" style:family="paragraph" style:parent-style-name="Standard">
      <style:paragraph-properties fo:text-align="left" style:justify-single-word="false"/>
      <style:text-properties style:font-name="Liberation Serif1" fo:font-size="18pt" fo:font-weight="normal" officeooo:rsid="001472c0" officeooo:paragraph-rsid="001472c0" style:font-size-asian="15.75pt" style:font-weight-asian="normal" style:font-size-complex="18pt" style:font-weight-complex="normal"/>
    </style:style>
    <style:style style:name="P3" style:family="paragraph" style:parent-style-name="Standard">
      <style:paragraph-properties fo:text-align="justify" style:justify-single-word="false"/>
      <style:text-properties fo:font-variant="normal" fo:text-transform="none" fo:color="#000000" loext:opacity="100%" style:font-name="iransans" fo:font-size="14pt" fo:letter-spacing="normal" fo:font-style="normal" fo:font-weight="normal" officeooo:rsid="001472c0" officeooo:paragraph-rsid="001472c0" style:font-size-asian="14pt" style:font-weight-asian="bold" style:font-size-complex="14pt" style:font-weight-complex="bold"/>
    </style:style>
    <style:style style:name="P4" style:family="paragraph" style:parent-style-name="Standard">
      <style:paragraph-properties fo:text-align="left" style:justify-single-word="false"/>
      <style:text-properties style:font-name="Liberation Serif1" fo:font-size="15pt" fo:font-weight="bold" officeooo:rsid="001472c0" officeooo:paragraph-rsid="001472c0" style:font-size-asian="13.1000003814697pt" style:font-weight-asian="bold" style:font-size-complex="15pt" style:font-weight-complex="bold"/>
    </style:style>
    <style:style style:name="P5" style:family="paragraph" style:parent-style-name="Standard">
      <style:paragraph-properties fo:text-align="left" style:justify-single-word="false"/>
      <style:text-properties style:font-name="Caladea" fo:font-size="14pt" fo:font-weight="normal" officeooo:rsid="001472c0" officeooo:paragraph-rsid="001472c0" style:font-size-asian="14pt" style:font-weight-asian="normal" style:font-size-complex="14pt" style:font-weight-complex="normal"/>
    </style:style>
    <style:style style:name="P6" style:family="paragraph" style:parent-style-name="Standard">
      <style:paragraph-properties fo:text-align="left" style:justify-single-word="false"/>
      <style:text-properties style:font-name="Caladea" fo:font-size="14pt" fo:font-weight="bold" officeooo:rsid="001472c0" officeooo:paragraph-rsid="001472c0" style:font-size-asian="14pt" style:font-weight-asian="bold" style:font-size-complex="14pt" style:font-weight-complex="bold"/>
    </style:style>
    <style:style style:name="P7" style:family="paragraph" style:parent-style-name="Standard">
      <style:paragraph-properties fo:text-align="left" style:justify-single-word="false"/>
      <style:text-properties style:font-name="Caladea" fo:font-size="14pt" fo:font-weight="normal" officeooo:rsid="001472c0" officeooo:paragraph-rsid="00161c76" style:font-size-asian="14pt" style:font-weight-asian="normal" style:font-size-complex="14pt" style:font-weight-complex="normal"/>
    </style:style>
    <style:style style:name="P8" style:family="paragraph" style:parent-style-name="Standard">
      <style:paragraph-properties fo:text-align="left" style:justify-single-word="false"/>
      <style:text-properties style:font-name="Caladea" fo:font-size="16pt" fo:font-weight="bold" officeooo:rsid="001472c0" officeooo:paragraph-rsid="001472c0"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variant="normal" fo:text-transform="none" fo:color="#000000" loext:opacity="100%" style:font-name="iransans" fo:font-size="14pt" fo:letter-spacing="normal" fo:font-style="normal" fo:font-weight="normal" officeooo:paragraph-rsid="001472c0" style:font-size-asian="14pt" style:font-size-complex="14pt"/>
    </style:style>
    <style:style style:name="P10" style:family="paragraph" style:parent-style-name="Standard">
      <style:paragraph-properties fo:text-align="justify" style:justify-single-word="false"/>
      <style:text-properties fo:font-variant="normal" fo:text-transform="none" fo:color="#000000" loext:opacity="100%" style:font-name="iransans" fo:font-size="16pt" fo:letter-spacing="normal" fo:font-style="normal" fo:font-weight="bold" officeooo:paragraph-rsid="001472c0"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font-name="iransans" fo:font-size="13pt" fo:letter-spacing="normal" fo:font-style="normal" fo:font-weight="bold" officeooo:paragraph-rsid="001472c0" style:font-size-asian="13pt" style:font-weight-asian="bold" style:font-size-complex="13pt"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font-name="iransans" fo:font-size="13pt" fo:letter-spacing="normal" fo:font-style="normal" fo:font-weight="normal" officeooo:paragraph-rsid="001472c0" style:font-size-asian="13pt" style:font-size-complex="13pt"/>
    </style:style>
    <style:style style:name="P13" style:family="paragraph" style:parent-style-name="Standard">
      <style:paragraph-properties fo:text-align="justify" style:justify-single-word="false"/>
      <style:text-properties fo:font-variant="normal" fo:text-transform="none" fo:color="#000000" loext:opacity="100%" style:font-name="iransans" fo:font-size="13pt" fo:letter-spacing="normal" fo:font-style="normal" fo:font-weight="normal" officeooo:paragraph-rsid="00161c76" style:font-size-asian="13pt" style:font-size-complex="13pt"/>
    </style:style>
    <style:style style:name="P14" style:family="paragraph" style:parent-style-name="Standard">
      <style:paragraph-properties fo:text-align="justify" style:justify-single-word="false"/>
      <style:text-properties fo:font-variant="normal" fo:text-transform="none" fo:color="#000000" loext:opacity="100%" style:font-name="Caladea" fo:font-size="15pt" fo:letter-spacing="normal" fo:font-style="normal" fo:font-weight="normal" officeooo:paragraph-rsid="001472c0" style:font-size-asian="15pt" style:font-size-complex="15pt"/>
    </style:style>
    <style:style style:name="P15" style:family="paragraph" style:parent-style-name="Standard">
      <style:paragraph-properties fo:text-align="justify" style:justify-single-word="false"/>
      <style:text-properties fo:font-variant="normal" fo:text-transform="none" fo:color="#000000" loext:opacity="100%" style:font-name="Caladea" fo:font-size="15pt" fo:letter-spacing="normal" fo:font-style="normal" fo:font-weight="bold" officeooo:rsid="0016b45b" officeooo:paragraph-rsid="0016b45b" style:font-size-asian="15pt" style:font-weight-asian="bold" style:font-size-complex="15pt"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font-name="iransans" fo:font-size="13pt" fo:letter-spacing="normal" fo:font-style="normal" fo:font-weight="bold" officeooo:rsid="0016b45b" officeooo:paragraph-rsid="0016b45b" style:font-size-asian="13pt" style:font-weight-asian="bold" style:font-size-complex="13pt"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font-name="iransans" fo:font-size="13pt" fo:letter-spacing="normal" fo:font-style="normal" fo:font-weight="bold" officeooo:paragraph-rsid="001472c0" style:font-size-asian="13pt" style:font-size-complex="13pt"/>
    </style:style>
    <style:style style:name="P18"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normal" officeooo:paragraph-rsid="001472c0" style:font-size-asian="12pt" style:font-size-complex="12pt"/>
    </style:style>
    <style:style style:name="P19"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normal" officeooo:paragraph-rsid="00177556"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bold" officeooo:paragraph-rsid="001472c0" style:font-size-asian="12pt" style:font-size-complex="12pt"/>
    </style:style>
    <style:style style:name="P21"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bold" officeooo:paragraph-rsid="001472c0"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bold" officeooo:rsid="00177556" officeooo:paragraph-rsid="00177556"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variant="normal" fo:text-transform="none" fo:color="#000000" loext:opacity="100%" style:font-name="Caladea" fo:font-size="14pt" fo:letter-spacing="normal" fo:font-style="normal" fo:font-weight="bold" officeooo:rsid="00177556" officeooo:paragraph-rsid="00177556"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normal" officeooo:rsid="00177556" officeooo:paragraph-rsid="00177556" style:font-size-asian="12pt" style:font-weight-asian="normal" style:font-size-complex="12pt" style:font-weight-complex="normal"/>
    </style:style>
    <style:style style:name="P25" style:family="paragraph" style:parent-style-name="Standard">
      <style:paragraph-properties fo:text-align="left" style:justify-single-word="false"/>
      <style:text-properties fo:font-variant="normal" fo:text-transform="none" fo:color="#000000" loext:opacity="100%" style:font-name="iransans" fo:font-size="12pt" fo:letter-spacing="normal" fo:font-style="normal" fo:font-weight="normal" officeooo:rsid="00177556" officeooo:paragraph-rsid="00182146"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bold" officeooo:rsid="001975e1" officeooo:paragraph-rsid="001975e1"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normal" officeooo:rsid="001975e1" officeooo:paragraph-rsid="001975e1" style:font-size-asian="12pt" style:font-weight-asian="normal" style:font-size-complex="12pt" style:font-weight-complex="normal"/>
    </style:style>
    <style:style style:name="T1" style:family="text">
      <style:text-properties officeooo:rsid="00161c76"/>
    </style:style>
    <style:style style:name="T2" style:family="text">
      <style:text-properties officeooo:rsid="00177556" style:font-weight-asian="bold" style:font-weight-complex="bold"/>
    </style:style>
    <style:style style:name="T3" style:family="text">
      <style:text-properties style:font-weight-asian="bold" style:font-weight-complex="bold"/>
    </style:style>
    <style:style style:name="T4" style:family="text">
      <style:text-properties officeooo:rsid="001975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ing Section</text:p>
      <text:p text:style-name="P1"/>
      <text:p text:style-name="P2">- Sample 1 (ETS)</text:p>
      <text:p text:style-name="P2">- <text:span text:style-name="T1">Module One</text:span></text:p>
      <text:p text:style-name="P2"/>
      <text:p text:style-name="P3">Very young children cannot recognize themselves in a mirror; they usually achieve this milestone around 18 months of age. The ability to recognize oneself in the mirror is considered to be a key component of self-awareness and consciousness for humans. But what about animals? For many years, scientists have known that members of the great ape family could recognize themselves in mirrors. They measured this by the “mirror test,” which involved putting a colored mark on an ape’s body, and then showing the ape its reflection in a mirror. If the ape tried to remove the mark on its own body, the scientists knew that the ape was recognizing its reflection. Apes are close relatives of humans, but in recent years, scientists have discovered that other animals also pass the “mirror test.” Elephants and dolphins have shown signs of self-recognition. These, like apes, are highly intelligent animals. But in a more recent experiment, a type of fish called the cleaner fish tried to scrape a mark off its body when it saw itself in the mirror. This suggests that even less intelligent animals may possess more self-awareness than previously suspect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1) What is the passage mainly about?</text:p>
      <text:p text:style-name="P5"/>
      <text:p text:style-name="P5">- Stages of early childhood development</text:p>
      <text:p text:style-name="P5">- Research on animal cognition</text:p>
      <text:p text:style-name="P5">- Differences between apes, elephants, and dolphins</text:p>
      <text:p text:style-name="P5">- Recent experiments on fish</text:p>
      <text:p text:style-name="P5"/>
      <text:p text:style-name="P6"><text:span text:style-name="T1">2) </text:span>The word “milestone” in the first sentence is closest in meaning to</text:p>
      <text:p text:style-name="P5"/>
      <text:p text:style-name="P5">- accomplishment</text:p>
      <text:p text:style-name="P7">- distance</text:p>
      <text:p text:style-name="P7">- weight</text:p>
      <text:p text:style-name="P5">- discovery</text:p>
      <text:p text:style-name="P5"/>
      <text:p text:style-name="P6"><text:span text:style-name="T1">3) </text:span>Why did scientists put colored marks on animals’ bodies?</text:p>
      <text:p text:style-name="P5"/>
      <text:p text:style-name="P5">- It made it possible to track the animals’ movements.</text:p>
      <text:p text:style-name="P5">- It helped them determine whether the animals recognized themselves.</text:p>
      <text:p text:style-name="P5">- It made it easier to tell the animals apart.</text:p>
      <text:p text:style-name="P5">- It showed whether some animals can detect color differences.</text:p>
      <text:p text:style-name="P5"/>
      <text:p text:style-name="P6"><text:span text:style-name="T1">4) </text:span>According to the passage, all of the following are true about elephants EXCEPT:</text:p>
      <text:p text:style-name="P5"/>
      <text:p text:style-name="P5">- They can recognize themselves in mirrors.</text:p>
      <text:p text:style-name="P5">- They are highly intelligent animals.</text:p>
      <text:p text:style-name="P5">- They possess qualities in common with apes.</text:p>
      <text:p text:style-name="P5">- They understand certain signs from other animals.</text:p>
      <text:p text:style-name="P5"/>
      <text:p text:style-name="P6"><text:span text:style-name="T1">5) </text:span>Why does the author mention cleaner fish?</text:p>
      <text:p text:style-name="P6"/>
      <text:p text:style-name="P5">- To suggest that a wide range of animals may possess self-awareness</text:p>
      <text:p text:style-name="P7">- To imply that ocean animals are highly intelligent</text:p>
      <text:p text:style-name="P7">- To demonstrate a flaw in a recent experiment</text:p>
      <text:p text:style-name="P5">- To provide an example of an animal that does not recognize itself</text:p>
      <text:p text:style-name="P5"/>
      <text:p text:style-name="P5"/>
      <text:p text:style-name="P5"/>
      <text:p text:style-name="P5"/>
      <text:p text:style-name="P5"/>
      <text:p text:style-name="P5"><text:soft-page-break/></text:p>
      <text:p text:style-name="P8">- <text:span text:style-name="T1">Module Two;</text:span></text:p>
      <text:p text:style-name="P8"/>
      <text:p text:style-name="P9">The paradox of choice, a concept popularized by psychologist Barry Schwartz, suggests that more options can lead to less satisfaction. While the freedom to choose is fundamental to consumer culture, an overabundance of choices—from groceries to electronics—can overwhelm individuals, causing anxiety and decision fatigue. This paradox implies that the vast array of possibilities available today might actually diminish consumer contentment, as the fear of making the wrong choice looms large. Research supports this notion. In an experiment, psychologist Sheena Iyengar found that shoppers were more likely to purchase jam when offered 6 varieties instead of 24. The limited selection eased the decision process, reducing the pressure to find the ‘perfect’ option and making the experience more enjoyable. This phenomenon reveals that fewer choices can sometimes make consumers happier, which is a valuable insight for marketers and retailers aiming to boost satisfaction by curating their offerings. The paradox also has broader implications. In individualistic cultures, where personal choice is highly valued, the burden of decision-making can be significant. Conversely, collectivist cultures, which often provide fewer choices, report higher levels of contentment. This dynamic suggests that understanding cultural differences in consumer psychology can help businesses optimize their product strategies enhance overall well-being.</text:p>
      <text:p text:style-name="P9"/>
      <text:p text:style-name="P10">-<text:span text:style-name="T1">NOTE :</text:span></text:p>
      <text:p text:style-name="P9"/>
      <text:p text:style-name="P9"/>
      <text:p text:style-name="P9"/>
      <text:p text:style-name="P9"/>
      <text:p text:style-name="P9"/>
      <text:p text:style-name="P9"/>
      <text:p text:style-name="P9"/>
      <text:p text:style-name="P9"/>
      <text:p text:style-name="P9"/>
      <text:p text:style-name="P11"><text:soft-page-break/><text:span text:style-name="T1">1) </text:span>Which of the following best states a main idea of the passage?</text:p>
      <text:p text:style-name="P12"/>
      <text:p text:style-name="P12">- Effective marketing strategies focus on increasing product options.</text:p>
      <text:p text:style-name="P12">- Modern consumer culture is driven by a demand for fewer products.</text:p>
      <text:p text:style-name="P12">- Individualism enhances consumer contentment.</text:p>
      <text:p text:style-name="P12">- Limiting consumer choices can lead to higher satisfaction.</text:p>
      <text:p text:style-name="P12"/>
      <text:p text:style-name="P11"><text:span text:style-name="T1">2) </text:span>What is one effect of decision fatigue as mentioned in the passage?</text:p>
      <text:p text:style-name="P12"/>
      <text:p text:style-name="P13">- Desire to make the same choices as other consumers</text:p>
      <text:p text:style-name="P13">- Anxiety about making the wrong choice</text:p>
      <text:p text:style-name="P13">- Preference for consumer cultures</text:p>
      <text:p text:style-name="P12">- Enhanced freedom to choose</text:p>
      <text:p text:style-name="P12"/>
      <text:p text:style-name="P11"><text:span text:style-name="T1">3) </text:span>Why does the author mention Sheena lyengar’s experiment?</text:p>
      <text:p text:style-name="P12"/>
      <text:p text:style-name="P12">- To highlight the effectiveness of marketing strategies</text:p>
      <text:p text:style-name="P12">- To explain the methodology used in consumer psychology</text:p>
      <text:p text:style-name="P12">- To provide evidence supporting the paradox of choice</text:p>
      <text:p text:style-name="P12">- To criticize the abundance of products in modern markets</text:p>
      <text:p text:style-name="P12"/>
      <text:p text:style-name="P11"><text:span text:style-name="T1">4) </text:span>The word “curating” in the passage is closest in meaning to</text:p>
      <text:p text:style-name="P12"/>
      <text:p text:style-name="P12">- eliminating</text:p>
      <text:p text:style-name="P13">- organizing</text:p>
      <text:p text:style-name="P13">- increasing</text:p>
      <text:p text:style-name="P12">- changing</text:p>
      <text:p text:style-name="P12"/>
      <text:p text:style-name="P11"><text:span text:style-name="T1">5) </text:span>What can be inferred about consumers in collectivist cultures?</text:p>
      <text:p text:style-name="P12"/>
      <text:p text:style-name="P12">- They tend to report lower levels of satisfaction.</text:p>
      <text:p text:style-name="P12">- They are more affected by the paradox of choice.</text:p>
      <text:p text:style-name="P12">- They generally have fewer choices available.</text:p>
      <text:p text:style-name="P12">- They prefer individual decision-making.</text:p>
      <text:p text:style-name="P12"/>
      <text:p text:style-name="P12"/>
      <text:p text:style-name="P12"/>
      <text:p text:style-name="P14"/>
      <text:p text:style-name="P15"><text:soft-page-break/>- Sample 2 (ETS)</text:p>
      <text:p text:style-name="P15">- Module 1</text:p>
      <text:p text:style-name="P16"/>
      <text:p text:style-name="P11">The Impact of Sports on Social Integration</text:p>
      <text:p text:style-name="P12"/>
      <text:p text:style-name="P12">Sports can promote social integration by bridging gaps between people of various backgrounds. Participation in sports can lead to increased social cohesion and improved relationships among diverse groups.</text:p>
      <text:p text:style-name="P12"/>
      <text:p text:style-name="P12">For example, community soccer leagues often bring together people from different ethnicities, creating an environment where cultural differences are celebrated and mutual respect is cultivated. However, the impact of sports on social integration is not without challenges. Competitive environments can sometimes exacerbate social tensions, particularly when favoritism or exclusionary practices are present.</text:p>
      <text:p text:style-name="P12"/>
      <text:p text:style-name="P12">Despite these issues, many initiatives aim to use sports as a platform for social change. One such initiative is the Sport for Peace program, which focuses on conflict resolution through team-building activities and collaborative sports events. The role of sports in social integration extends beyond participation. Spectatorship and fandom also play significant roles in uniting people. Major international sports events like the Olympics or the World Cup serve as opportunities for nations to come together and share common goals. The visibility of athletes from diverse backgrounds during these events fosters a sense of global harmony. These events often highlight stories of athletes overcoming adversity, inspiring spectators and fostering a collective sense of achievemen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text:soft-page-break/><text:span text:style-name="T2">1) </text:span><text:span text:style-name="T3">The word “cohesion” in the passage is closest in meaning to</text:span></text:p>
      <text:p text:style-name="P12">- diversity</text:p>
      <text:p text:style-name="P12">- awareness</text:p>
      <text:p text:style-name="P12">- unity</text:p>
      <text:p text:style-name="P12">- celebration</text:p>
      <text:p text:style-name="P12"/>
      <text:p text:style-name="P17"><text:span text:style-name="T2">2) </text:span><text:span text:style-name="T3">In which of the following situations can sports have an especially negative impact on social integration?</text:span></text:p>
      <text:p text:style-name="P18">- When people from different ethnicities are brought together</text:p>
      <text:p text:style-name="P19">- When participants are unreasonably strict about the rules of competition</text:p>
      <text:p text:style-name="P19">- When the social environment is not favorable to competition</text:p>
      <text:p text:style-name="P18">- When social tensions are heightened by favoring or excluding certain participants</text:p>
      <text:p text:style-name="P18"/>
      <text:p text:style-name="P20"><text:span text:style-name="T2">3) </text:span><text:span text:style-name="T3">What is the relationship between paragraphs 2 and 3 ?</text:span></text:p>
      <text:p text:style-name="P18">- Paragraph 3 discusses ways of addressing a problem mentioned in paragraph 2.</text:p>
      <text:p text:style-name="P18">- Paragraph 3 contradicts a theory proposed in paragraph 2.</text:p>
      <text:p text:style-name="P18">- Paragraph 3 provides evidence for an idea presented in paragraph 2.</text:p>
      <text:p text:style-name="P18">- Paragraph 3 introduces a new challenge related to paragraph 2.</text:p>
      <text:p text:style-name="P18"/>
      <text:p text:style-name="P20"><text:span text:style-name="T2">4) </text:span><text:span text:style-name="T3">What does the passage suggest about the Sport for Peace program?</text:span></text:p>
      <text:p text:style-name="P18">- Its main goal is to eliminate favoritism in sports.</text:p>
      <text:p text:style-name="P18">- It primarily targets professional athletes.</text:p>
      <text:p text:style-name="P18">- It uses team-building exercises to address conflicts.</text:p>
      <text:p text:style-name="P18">- It is only effective in local communities.</text:p>
      <text:p text:style-name="P21"/>
      <text:p text:style-name="P20"><text:span text:style-name="T2">5) </text:span><text:span text:style-name="T3">Why does the author mention major international sports events like the Olympics and the World Cup?</text:span></text:p>
      <text:p text:style-name="P18">- To argue that these events have little impact on social integration</text:p>
      <text:p text:style-name="P18">- To illustrate how sports can unite people globally</text:p>
      <text:p text:style-name="P18">- To suggest that these events mainly benefit athletes</text:p>
      <text:p text:style-name="P18">- To highlight the competitive nature of these events</text:p>
      <text:p text:style-name="P18"/>
      <text:p text:style-name="P22">#NOTE</text:p>
      <text:p text:style-name="P22"/>
      <text:p text:style-name="P22"/>
      <text:p text:style-name="P22"/>
      <text:p text:style-name="P22"/>
      <text:p text:style-name="P22"/>
      <text:p text:style-name="P22"/>
      <text:p text:style-name="P22"/>
      <text:p text:style-name="P23"><text:soft-page-break/>- Sample 2 (ETS)</text:p>
      <text:p text:style-name="P23">- Module 2</text:p>
      <text:p text:style-name="P22"/>
      <text:p text:style-name="P22">The Human Microbiome</text:p>
      <text:p text:style-name="P22"/>
      <text:p text:style-name="P24">The human microbiome consists of trillions of microorganisms living in and on our bodies. These include bacteria, viruses, fungi, and other microbes. They play a pivotal role in functions such as digestion, immunity, and mood regulation. For instance, gut bacteria help break down food and produce essential vitamins.</text:p>
      <text:p text:style-name="P24"/>
      <text:p text:style-name="P24">Recent studies show that the microbiome can be influenced by diet, lifestyle, and medication. Antibiotics, while effective against harmful bacteria, can disrupt the balance of beneficial microbes. This disruption can lead to health issues like digestive problems and weakened immunity. Researchers are exploring the connection between the microbiome and mental health. Certain gut bacteria produce neurotransmitters affecting brain function. An imbalance in these bacteria may be linked to conditions like depression and anxiety.</text:p>
      <text:p text:style-name="P24"/>
      <text:p text:style-name="P24">Maintaining a healthy microbiome involves eating a varied diet rich in fiber, reducing stress, and avoiding unnecessary antibiotics. Bacteria that aid digestion, known as robiotics and prebiotics, are also beneficial. As understanding of the microbiome grows, it may lead to breakthroughs in treating diseases and improving health.</text:p>
      <text:p text:style-name="P24"/>
      <text:p text:style-name="P22">#NOTE</text:p>
      <text:p text:style-name="P22"/>
      <text:p text:style-name="P22"/>
      <text:p text:style-name="P2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text:soft-page-break/>1) The word “pivotal” in the passage is closest in meaning to</text:p>
      <text:p text:style-name="P24">- very important</text:p>
      <text:p text:style-name="P24">- possible</text:p>
      <text:p text:style-name="P24">- combined</text:p>
      <text:p text:style-name="P24">- unwelcome </text:p>
      <text:p text:style-name="P24"/>
      <text:p text:style-name="P22">2) What is one way antibiotics can affect humans?</text:p>
      <text:p text:style-name="P24">- They enhance the production of neurotransmitters.</text:p>
      <text:p text:style-name="P24">- They can weaken immunity by harming beneficial microbes.</text:p>
      <text:p text:style-name="P24">- They can help relieve digestive problems.</text:p>
      <text:p text:style-name="P24">- They make it easier to produce essential vitamins.</text:p>
      <text:p text:style-name="P24"/>
      <text:p text:style-name="P22">3) What connection are researchers exploring regarding the microbiome?</text:p>
      <text:p text:style-name="P24">- The link between gut bacteria and immunity</text:p>
      <text:p text:style-name="P24">- The role of fungi in mood regulation</text:p>
      <text:p text:style-name="P24">- The role of viruses in digestion</text:p>
      <text:p text:style-name="P24">- The link between gut bacteria and mental health</text:p>
      <text:p text:style-name="P24"/>
      <text:p text:style-name="P22">4) All of the following help to maintain a healthy microbiome EXCEPT</text:p>
      <text:p text:style-name="P24">- eating a varied diet rich in fiber</text:p>
      <text:p text:style-name="P24">- lowering stress levels</text:p>
      <text:p text:style-name="P24">- avoiding sources of bacteria</text:p>
      <text:p text:style-name="P24">- reducing the use of antibiotics</text:p>
      <text:p text:style-name="P24"/>
      <text:p text:style-name="P22">5) What is the relationship between paragraphs 2 and 3 ?</text:p>
      <text:p text:style-name="P24">- Paragraph 3 challenges the ideas proposed in paragraph 2.</text:p>
      <text:p text:style-name="P24">- Paragraph 3 provides examples of the disruptions mentioned in paragraph 2.</text:p>
      <text:p text:style-name="P25">- Paragraph 3 specifies how to achieve a healthy microbiome based on the factors <text:s text:c="5"/></text:p>
      <text:p text:style-name="P25">mentioned in paragraph 2.</text:p>
      <text:p text:style-name="P24">- Paragraph 3 elaborates on the benefits of antibiotics mentioned in paragraph 2.</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2"><text:soft-page-break/>- <text:span text:style-name="T4">Sample 3 (ETS)</text:span></text:p>
      <text:p text:style-name="P22">- <text:span text:style-name="T4">Module 1</text:span></text:p>
      <text:p text:style-name="P22"/>
      <text:p text:style-name="P22">The History of Photography</text:p>
      <text:p text:style-name="P22"/>
      <text:p text:style-name="P24">The history of photography is marked by significant technological progress and artistic innovation. It began in the early nineteenth century with the invention of the camera obscura, a device that projected images onto a surface. The first permanent photograph was created by Joseph-Nicéphore Niépce in 1826 using a process called heliography, which required several hours of exposure to light.</text:p>
      <text:p text:style-name="P24"/>
      <text:p text:style-name="P24">Photography quickly evolved with the development of daguerreotypes, introduced by Louis Daguerre in 1839. This method produced detailed images on silver-plated copper, but daguerreotypes needed delicate handling, and the exposure times required, although much shorter, still remained impractical for recording images of moving objects. The invention of the calotype by William Henry Fox Talbot in the 1840s allowed for multiple copies of an image to be made from a single negative, revolutionizing the field. </text:p>
      <text:p text:style-name="P24"/>
      <text:p text:style-name="P24">(A) In the late nineteenth and early twentieth centuries, the introduction of film and roll cameras made photography more accessible to the public. (B) George Eastman’s establishment of the Kodak company in 1888 played a crucial role in this democratization, as his cameras were simple to use and affordable. (C) Today, digital photography has further transformed the medium, allowing instant image capture and sharing. (D)</text:p>
      <text:p text:style-name="P24"/>
      <text:p text:style-name="P26">#NOT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1) The word “innovation” in the passage is closest in meaning to</text:p>
      <text:p text:style-name="P27">- success</text:p>
      <text:p text:style-name="P27">- advancement</text:p>
      <text:p text:style-name="P27">- activity</text:p>
      <text:p text:style-name="P27">- expression</text:p>
      <text:p text:style-name="P27"/>
      <text:p text:style-name="P26">2) What is suggested about daguerreotypes?</text:p>
      <text:p text:style-name="P27">- They were introduced by Joseph-Nicéphore Niépce.</text:p>
      <text:p text:style-name="P27">- They allowed for multiple copies of an image.</text:p>
      <text:p text:style-name="P27">- They required shorter exposure times than heliographs did.</text:p>
      <text:p text:style-name="P27">- They made it unnecessary to use silver-plated copper.</text:p>
      <text:p text:style-name="P27"/>
      <text:p text:style-name="P26">3) How did the calotype revolutionize photography?</text:p>
      <text:p text:style-name="P27">- By enabling instant image capture</text:p>
      <text:p text:style-name="P27">- By reducing the need for delicate handling</text:p>
      <text:p text:style-name="P27">- By providing detailed images on silver-plated copper</text:p>
      <text:p text:style-name="P27">- By allowing multiple copies from a single negative</text:p>
      <text:p text:style-name="P27"/>
      <text:p text:style-name="P26">4) Why does the author mention George Eastman’s establishment of the Kodak company?</text:p>
      <text:p text:style-name="P27">- To highlight the role of Kodak in making photography accessible to the public</text:p>
      <text:p text:style-name="P27">- To criticize the challenges of early photographic methods</text:p>
      <text:p text:style-name="P27">- To explain how film was invented</text:p>
      <text:p text:style-name="P27">- To suggest that Kodak introduced digital photography</text:p>
      <text:p text:style-name="P27"/>
      <text:p text:style-name="P26">5) There are four locations (A, B, C, and D) in the passage that indicate where the following sentence could be added. These developments have rendered the use of film and many types of cameras obsolete.</text:p>
      <text:p text:style-name="P27">- Option A</text:p>
      <text:p text:style-name="P27">- Option B</text:p>
      <text:p text:style-name="P27">- Option C</text:p>
      <text:p text:style-name="P27">- Option D</text:p>
      <text:p text:style-name="P27"/>
      <text:p text:style-name="P26">#NOTE</text:p>
      <text:p text:style-name="P26"/>
      <text:p text:style-name="P26"/>
      <text:p text:style-name="P26"/>
      <text:p text:style-name="P26"/>
      <text:p text:style-name="P26"/>
      <text:p text:style-name="P26"/>
      <text:p text:style-name="P26"/>
      <text:p text:style-name="P26"><text:soft-page-break/>- Sample 3 (ETS)</text:p>
      <text:p text:style-name="P26">- Module 2</text:p>
      <text:p text:style-name="P26"/>
      <text:p text:style-name="P26"/>
      <text:p text:style-name="P26"/>
      <text:p text:style-name="P26">The Effects of Urbanization on Bird Populations</text:p>
      <text:p text:style-name="P26"/>
      <text:p text:style-name="P27">Urbanization has had a profound impact on bird populations worldwide. As cities expand, natural habitats are replaced with buildings, roads, and other infrastructure. This leads to a significant reduction in the availability of nesting sites and food sources for birds.</text:p>
      <text:p text:style-name="P27"/>
      <text:p text:style-name="P27">Some species, such as pigeons and sparrows, have adapted well to urban environments, taking advantage of the new resources and structures. However, many other species struggle to survive in these altered landscapes. Therefore, it is imperative to find solutions that help birds adapt to city life.</text:p>
      <text:p text:style-name="P27"/>
      <text:p text:style-name="P27">One notable effect of urbanization is the change in bird song. Birds living in cities often sing at higher pitches and volumes than their rural counterparts. This adaptation helps them communicate over the noise of traffic and human activity. Additionally, the artificial lighting in cities can disrupt the natural circadian (daily time-related) rhythms of birds, affecting their breeding and feeding behaviors.</text:p>
      <text:p text:style-name="P27"/>
      <text:p text:style-name="P27">Conservationists are working to mitigate the negative effects of urbanization on birds. Initiatives such as creating urban green spaces, constructing bird-friendly buildings, and reducing light pollution are being implemented. These efforts aim to create a more hospitable environment for birds, allowing them to coexist with humans in urban setting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6">1) The word “mitigate” in the passage is closest in meaning to</text:p>
      <text:p text:style-name="P27">- understand</text:p>
      <text:p text:style-name="P27">- analyze</text:p>
      <text:p text:style-name="P27">- communicate</text:p>
      <text:p text:style-name="P27">- reduce</text:p>
      <text:p text:style-name="P27"/>
      <text:p text:style-name="P26">2) Which of the following is NOT mentioned as an effect of urbanization on birds in the passage?</text:p>
      <text:p text:style-name="P27">- Reduced availability of nesting sites</text:p>
      <text:p text:style-name="P27">- Changes in bird song</text:p>
      <text:p text:style-name="P27">- Increased food sources</text:p>
      <text:p text:style-name="P27">- Disrupted circadian rhythms</text:p>
      <text:p text:style-name="P27"/>
      <text:p text:style-name="P26">3) Why does the author mention pigeons and sparrows?</text:p>
      <text:p text:style-name="P27">- To identify birds that struggle to survive in urban environments</text:p>
      <text:p text:style-name="P27">- To give examples of birds that have adjusted to living in urban settings</text:p>
      <text:p text:style-name="P27">- To highlight the diversity of urban bird species</text:p>
      <text:p text:style-name="P27">- To suggest that all birds can adapt to cities</text:p>
      <text:p text:style-name="P27"/>
      <text:p text:style-name="P26">4) What is one initiative mentioned in the passage to help birds in urban areas?</text:p>
      <text:p text:style-name="P27">- Introducing new bird species to urban areas</text:p>
      <text:p text:style-name="P27">- Providing human-made food sources to birds</text:p>
      <text:p text:style-name="P27">- Creating urban green spaces</text:p>
      <text:p text:style-name="P27">- Decreasing the amount of noise made by traffic</text:p>
      <text:p text:style-name="P27"/>
      <text:p text:style-name="P26">5) What can be inferred about the impact artificial lighting in cities has on birds?</text:p>
      <text:p text:style-name="P27">- It disrupts the natural behaviors of birds.</text:p>
      <text:p text:style-name="P27">- It allows birds to find food at night.</text:p>
      <text:p text:style-name="P27">- It helps birds to adapt to urban environments.</text:p>
      <text:p text:style-name="P27">- It increases the population of urban birds.</text:p>
      <text:p text:style-name="P27"/>
      <text:p text:style-name="P26">#N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iransans" svg:font-family="irans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3T00:51:19.967530358</meta:creation-date>
    <dc:date>2026-07-04T13:25:18.299212014</dc:date>
    <meta:editing-duration>PT50M52S</meta:editing-duration>
    <meta:editing-cycles>4</meta:editing-cycles>
    <meta:generator>LibreOffice/26.2.4.2$Linux_X86_64 LibreOffice_project/620$Build-2</meta:generator>
    <meta:print-date>2026-07-04T09:38:16.091822179</meta:print-date>
    <meta:document-statistic meta:table-count="0" meta:image-count="0" meta:object-count="0" meta:page-count="12" meta:paragraph-count="188" meta:word-count="2442" meta:character-count="15278" meta:non-whitespace-character-count="13018"/>
  </office:meta>
</office:document-meta>
</file>