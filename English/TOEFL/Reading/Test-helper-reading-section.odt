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adea" svg:font-family="Calade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iransans" svg:font-family="iransans"/>
  </office:font-face-decls>
  <office:automatic-styles>
    <style:style style:name="P1" style:family="paragraph" style:parent-style-name="Standard">
      <style:paragraph-properties fo:text-align="center" style:justify-single-word="false"/>
      <style:text-properties style:font-name="Liberation Serif1" fo:font-size="36pt" fo:font-weight="bold" officeooo:rsid="001472c0" officeooo:paragraph-rsid="001472c0" style:font-size-asian="36pt" style:font-weight-asian="bold" style:font-size-complex="36pt" style:font-weight-complex="bold"/>
    </style:style>
    <style:style style:name="P2" style:family="paragraph" style:parent-style-name="Standard">
      <style:paragraph-properties fo:text-align="left" style:justify-single-word="false"/>
      <style:text-properties style:font-name="Liberation Serif1" fo:font-size="18pt" fo:font-weight="normal" officeooo:rsid="001472c0" officeooo:paragraph-rsid="001472c0" style:font-size-asian="15.75pt" style:font-weight-asian="normal" style:font-size-complex="18pt" style:font-weight-complex="normal"/>
    </style:style>
    <style:style style:name="P3" style:family="paragraph" style:parent-style-name="Standard">
      <style:paragraph-properties fo:text-align="justify" style:justify-single-word="false"/>
      <style:text-properties fo:font-variant="normal" fo:text-transform="none" fo:color="#000000" loext:opacity="100%" style:font-name="iransans" fo:font-size="14pt" fo:letter-spacing="normal" fo:font-style="normal" fo:font-weight="normal" officeooo:rsid="001472c0" officeooo:paragraph-rsid="001472c0" style:font-size-asian="14pt" style:font-weight-asian="bold" style:font-size-complex="14pt" style:font-weight-complex="bold"/>
    </style:style>
    <style:style style:name="P4" style:family="paragraph" style:parent-style-name="Standard">
      <style:paragraph-properties fo:text-align="left" style:justify-single-word="false"/>
      <style:text-properties style:font-name="Liberation Serif1" fo:font-size="15pt" fo:font-weight="bold" officeooo:rsid="001472c0" officeooo:paragraph-rsid="001472c0" style:font-size-asian="13.1000003814697pt" style:font-weight-asian="bold" style:font-size-complex="15pt" style:font-weight-complex="bold"/>
    </style:style>
    <style:style style:name="P5" style:family="paragraph" style:parent-style-name="Standard">
      <style:paragraph-properties fo:text-align="left" style:justify-single-word="false"/>
      <style:text-properties style:font-name="Caladea" fo:font-size="14pt" fo:font-weight="normal" officeooo:rsid="001472c0" officeooo:paragraph-rsid="001472c0" style:font-size-asian="14pt" style:font-weight-asian="normal" style:font-size-complex="14pt" style:font-weight-complex="normal"/>
    </style:style>
    <style:style style:name="P6" style:family="paragraph" style:parent-style-name="Standard">
      <style:paragraph-properties fo:text-align="left" style:justify-single-word="false"/>
      <style:text-properties style:font-name="Caladea" fo:font-size="14pt" fo:font-weight="bold" officeooo:rsid="001472c0" officeooo:paragraph-rsid="001472c0" style:font-size-asian="14pt" style:font-weight-asian="bold" style:font-size-complex="14pt" style:font-weight-complex="bold"/>
    </style:style>
    <style:style style:name="P7" style:family="paragraph" style:parent-style-name="Standard">
      <style:paragraph-properties fo:text-align="left" style:justify-single-word="false"/>
      <style:text-properties style:font-name="Caladea" fo:font-size="14pt" fo:font-weight="normal" officeooo:rsid="001472c0" officeooo:paragraph-rsid="00161c76" style:font-size-asian="14pt" style:font-weight-asian="normal" style:font-size-complex="14pt" style:font-weight-complex="normal"/>
    </style:style>
    <style:style style:name="P8" style:family="paragraph" style:parent-style-name="Standard">
      <style:paragraph-properties fo:text-align="left" style:justify-single-word="false"/>
      <style:text-properties style:font-name="Caladea" fo:font-size="16pt" fo:font-weight="bold" officeooo:rsid="001472c0" officeooo:paragraph-rsid="001472c0" style:font-size-asian="14pt" style:font-weight-asian="bold" style:font-size-complex="16pt" style:font-weight-complex="bold"/>
    </style:style>
    <style:style style:name="P9" style:family="paragraph" style:parent-style-name="Standard">
      <style:paragraph-properties fo:text-align="justify" style:justify-single-word="false"/>
      <style:text-properties fo:font-variant="normal" fo:text-transform="none" fo:color="#000000" loext:opacity="100%" style:font-name="iransans" fo:font-size="14pt" fo:letter-spacing="normal" fo:font-style="normal" fo:font-weight="normal" officeooo:paragraph-rsid="001472c0" style:font-size-asian="14pt" style:font-size-complex="14pt"/>
    </style:style>
    <style:style style:name="P10" style:family="paragraph" style:parent-style-name="Standard">
      <style:paragraph-properties fo:text-align="justify" style:justify-single-word="false"/>
      <style:text-properties fo:font-variant="normal" fo:text-transform="none" fo:color="#000000" loext:opacity="100%" style:font-name="iransans" fo:font-size="16pt" fo:letter-spacing="normal" fo:font-style="normal" fo:font-weight="bold" officeooo:paragraph-rsid="001472c0" style:font-size-asian="16pt" style:font-weight-asian="bold" style:font-size-complex="16pt" style:font-weight-complex="bold"/>
    </style:style>
    <style:style style:name="P11" style:family="paragraph" style:parent-style-name="Standard">
      <style:paragraph-properties fo:text-align="justify" style:justify-single-word="false"/>
      <style:text-properties fo:font-variant="normal" fo:text-transform="none" fo:color="#000000" loext:opacity="100%" style:font-name="iransans" fo:font-size="13pt" fo:letter-spacing="normal" fo:font-style="normal" fo:font-weight="bold" officeooo:paragraph-rsid="001472c0" style:font-size-asian="13pt" style:font-weight-asian="bold" style:font-size-complex="13pt" style:font-weight-complex="bold"/>
    </style:style>
    <style:style style:name="P12" style:family="paragraph" style:parent-style-name="Standard">
      <style:paragraph-properties fo:text-align="justify" style:justify-single-word="false"/>
      <style:text-properties fo:font-variant="normal" fo:text-transform="none" fo:color="#000000" loext:opacity="100%" style:font-name="iransans" fo:font-size="13pt" fo:letter-spacing="normal" fo:font-style="normal" fo:font-weight="normal" officeooo:paragraph-rsid="001472c0" style:font-size-asian="13pt" style:font-size-complex="13pt"/>
    </style:style>
    <style:style style:name="P13" style:family="paragraph" style:parent-style-name="Standard">
      <style:paragraph-properties fo:text-align="justify" style:justify-single-word="false"/>
      <style:text-properties fo:font-variant="normal" fo:text-transform="none" fo:color="#000000" loext:opacity="100%" style:font-name="iransans" fo:font-size="13pt" fo:letter-spacing="normal" fo:font-style="normal" fo:font-weight="normal" officeooo:paragraph-rsid="00161c76" style:font-size-asian="13pt" style:font-size-complex="13pt"/>
    </style:style>
    <style:style style:name="P14" style:family="paragraph" style:parent-style-name="Standard">
      <style:paragraph-properties fo:text-align="justify" style:justify-single-word="false"/>
      <style:text-properties fo:font-variant="normal" fo:text-transform="none" fo:color="#000000" loext:opacity="100%" style:font-name="Caladea" fo:font-size="15pt" fo:letter-spacing="normal" fo:font-style="normal" fo:font-weight="normal" officeooo:paragraph-rsid="001472c0" style:font-size-asian="15pt" style:font-size-complex="15pt"/>
    </style:style>
    <style:style style:name="P15" style:family="paragraph" style:parent-style-name="Standard">
      <style:paragraph-properties fo:text-align="justify" style:justify-single-word="false"/>
      <style:text-properties fo:font-variant="normal" fo:text-transform="none" fo:color="#000000" loext:opacity="100%" style:font-name="Caladea" fo:font-size="15pt" fo:letter-spacing="normal" fo:font-style="normal" fo:font-weight="bold" officeooo:rsid="0016b45b" officeooo:paragraph-rsid="0016b45b" style:font-size-asian="15pt" style:font-weight-asian="bold" style:font-size-complex="15pt" style:font-weight-complex="bold"/>
    </style:style>
    <style:style style:name="P16" style:family="paragraph" style:parent-style-name="Standard">
      <style:paragraph-properties fo:text-align="justify" style:justify-single-word="false"/>
      <style:text-properties fo:font-variant="normal" fo:text-transform="none" fo:color="#000000" loext:opacity="100%" style:font-name="iransans" fo:font-size="13pt" fo:letter-spacing="normal" fo:font-style="normal" fo:font-weight="bold" officeooo:rsid="0016b45b" officeooo:paragraph-rsid="0016b45b" style:font-size-asian="13pt" style:font-weight-asian="bold" style:font-size-complex="13pt" style:font-weight-complex="bold"/>
    </style:style>
    <style:style style:name="P17" style:family="paragraph" style:parent-style-name="Standard">
      <style:paragraph-properties fo:text-align="justify" style:justify-single-word="false"/>
      <style:text-properties fo:font-variant="normal" fo:text-transform="none" fo:color="#000000" loext:opacity="100%" style:font-name="iransans" fo:font-size="13pt" fo:letter-spacing="normal" fo:font-style="normal" fo:font-weight="bold" officeooo:paragraph-rsid="001472c0" style:font-size-asian="13pt" style:font-size-complex="13pt"/>
    </style:style>
    <style:style style:name="P18" style:family="paragraph" style:parent-style-name="Standard">
      <style:paragraph-properties fo:text-align="justify" style:justify-single-word="false"/>
      <style:text-properties fo:font-variant="normal" fo:text-transform="none" fo:color="#000000" loext:opacity="100%" style:font-name="iransans" fo:font-size="12pt" fo:letter-spacing="normal" fo:font-style="normal" fo:font-weight="normal" officeooo:paragraph-rsid="001472c0" style:font-size-asian="12pt" style:font-size-complex="12pt"/>
    </style:style>
    <style:style style:name="P19" style:family="paragraph" style:parent-style-name="Standard">
      <style:paragraph-properties fo:text-align="justify" style:justify-single-word="false"/>
      <style:text-properties fo:font-variant="normal" fo:text-transform="none" fo:color="#000000" loext:opacity="100%" style:font-name="iransans" fo:font-size="12pt" fo:letter-spacing="normal" fo:font-style="normal" fo:font-weight="normal" officeooo:paragraph-rsid="00177556" style:font-size-asian="12pt" style:font-size-complex="12pt"/>
    </style:style>
    <style:style style:name="P20" style:family="paragraph" style:parent-style-name="Standard">
      <style:paragraph-properties fo:text-align="justify" style:justify-single-word="false"/>
      <style:text-properties fo:font-variant="normal" fo:text-transform="none" fo:color="#000000" loext:opacity="100%" style:font-name="iransans" fo:font-size="12pt" fo:letter-spacing="normal" fo:font-style="normal" fo:font-weight="bold" officeooo:paragraph-rsid="001472c0" style:font-size-asian="12pt" style:font-size-complex="12pt"/>
    </style:style>
    <style:style style:name="P21" style:family="paragraph" style:parent-style-name="Standard">
      <style:paragraph-properties fo:text-align="justify" style:justify-single-word="false"/>
      <style:text-properties fo:font-variant="normal" fo:text-transform="none" fo:color="#000000" loext:opacity="100%" style:font-name="iransans" fo:font-size="12pt" fo:letter-spacing="normal" fo:font-style="normal" fo:font-weight="bold" officeooo:paragraph-rsid="001472c0"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variant="normal" fo:text-transform="none" fo:color="#000000" loext:opacity="100%" style:font-name="iransans" fo:font-size="12pt" fo:letter-spacing="normal" fo:font-style="normal" fo:font-weight="bold" officeooo:rsid="00177556" officeooo:paragraph-rsid="00177556"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variant="normal" fo:text-transform="none" fo:color="#000000" loext:opacity="100%" style:font-name="Caladea" fo:font-size="14pt" fo:letter-spacing="normal" fo:font-style="normal" fo:font-weight="bold" officeooo:rsid="00177556" officeooo:paragraph-rsid="00177556" style:font-size-asian="14pt" style:font-weight-asian="bold" style:font-size-complex="14pt" style:font-weight-complex="bold"/>
    </style:style>
    <style:style style:name="P24" style:family="paragraph" style:parent-style-name="Standard">
      <style:paragraph-properties fo:text-align="justify" style:justify-single-word="false"/>
      <style:text-properties fo:font-variant="normal" fo:text-transform="none" fo:color="#000000" loext:opacity="100%" style:font-name="iransans" fo:font-size="12pt" fo:letter-spacing="normal" fo:font-style="normal" fo:font-weight="normal" officeooo:rsid="00177556" officeooo:paragraph-rsid="00177556" style:font-size-asian="12pt" style:font-weight-asian="normal" style:font-size-complex="12pt" style:font-weight-complex="normal"/>
    </style:style>
    <style:style style:name="P25" style:family="paragraph" style:parent-style-name="Standard">
      <style:paragraph-properties fo:text-align="left" style:justify-single-word="false"/>
      <style:text-properties fo:font-variant="normal" fo:text-transform="none" fo:color="#000000" loext:opacity="100%" style:font-name="iransans" fo:font-size="12pt" fo:letter-spacing="normal" fo:font-style="normal" fo:font-weight="normal" officeooo:rsid="00177556" officeooo:paragraph-rsid="00182146" style:font-size-asian="12pt" style:font-weight-asian="normal" style:font-size-complex="12pt" style:font-weight-complex="normal"/>
    </style:style>
    <style:style style:name="T1" style:family="text">
      <style:text-properties officeooo:rsid="00161c76"/>
    </style:style>
    <style:style style:name="T2" style:family="text">
      <style:text-properties officeooo:rsid="00177556" style:font-weight-asian="bold" style:font-weight-complex="bold"/>
    </style:style>
    <style:style style:name="T3" style:family="text">
      <style:text-properties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ding Section</text:p>
      <text:p text:style-name="P1"/>
      <text:p text:style-name="P2">- Sample 1 (ETS)</text:p>
      <text:p text:style-name="P2">- <text:span text:style-name="T1">Module One</text:span></text:p>
      <text:p text:style-name="P2"/>
      <text:p text:style-name="P3">Very young children cannot recognize themselves in a mirror; they usually achieve this milestone around 18 months of age. The ability to recognize oneself in the mirror is considered to be a key component of self-awareness and consciousness for humans. But what about animals? For many years, scientists have known that members of the great ape family could recognize themselves in mirrors. They measured this by the “mirror test,” which involved putting a colored mark on an ape’s body, and then showing the ape its reflection in a mirror. If the ape tried to remove the mark on its own body, the scientists knew that the ape was recognizing its reflection. Apes are close relatives of humans, but in recent years, scientists have discovered that other animals also pass the “mirror test.” Elephants and dolphins have shown signs of self-recognition. These, like apes, are highly intelligent animals. But in a more recent experiment, a type of fish called the cleaner fish tried to scrape a mark off its body when it saw itself in the mirror. This suggests that even less intelligent animals may possess more self-awareness than previously suspecte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1) What is the passage mainly about?</text:p>
      <text:p text:style-name="P5"/>
      <text:p text:style-name="P5">- Stages of early childhood development</text:p>
      <text:p text:style-name="P5">- Research on animal cognition</text:p>
      <text:p text:style-name="P5">- Differences between apes, elephants, and dolphins</text:p>
      <text:p text:style-name="P5">- Recent experiments on fish</text:p>
      <text:p text:style-name="P5"/>
      <text:p text:style-name="P6"><text:span text:style-name="T1">2) </text:span>The word “milestone” in the first sentence is closest in meaning to</text:p>
      <text:p text:style-name="P5"/>
      <text:p text:style-name="P5">- accomplishment</text:p>
      <text:p text:style-name="P7">- distance</text:p>
      <text:p text:style-name="P7">- weight</text:p>
      <text:p text:style-name="P5">- discovery</text:p>
      <text:p text:style-name="P5"/>
      <text:p text:style-name="P6"><text:span text:style-name="T1">3) </text:span>Why did scientists put colored marks on animals’ bodies?</text:p>
      <text:p text:style-name="P5"/>
      <text:p text:style-name="P5">- It made it possible to track the animals’ movements.</text:p>
      <text:p text:style-name="P5">- It helped them determine whether the animals recognized themselves.</text:p>
      <text:p text:style-name="P5">- It made it easier to tell the animals apart.</text:p>
      <text:p text:style-name="P5">- It showed whether some animals can detect color differences.</text:p>
      <text:p text:style-name="P5"/>
      <text:p text:style-name="P6"><text:span text:style-name="T1">4) </text:span>According to the passage, all of the following are true about elephants EXCEPT:</text:p>
      <text:p text:style-name="P5"/>
      <text:p text:style-name="P5">- They can recognize themselves in mirrors.</text:p>
      <text:p text:style-name="P5">- They are highly intelligent animals.</text:p>
      <text:p text:style-name="P5">- They possess qualities in common with apes.</text:p>
      <text:p text:style-name="P5">- They understand certain signs from other animals.</text:p>
      <text:p text:style-name="P5"/>
      <text:p text:style-name="P6"><text:span text:style-name="T1">5) </text:span>Why does the author mention cleaner fish?</text:p>
      <text:p text:style-name="P6"/>
      <text:p text:style-name="P5">- To suggest that a wide range of animals may possess self-awareness</text:p>
      <text:p text:style-name="P7">- To imply that ocean animals are highly intelligent</text:p>
      <text:p text:style-name="P7">- To demonstrate a flaw in a recent experiment</text:p>
      <text:p text:style-name="P5">- To provide an example of an animal that does not recognize itself</text:p>
      <text:p text:style-name="P5"/>
      <text:p text:style-name="P5"/>
      <text:p text:style-name="P5"/>
      <text:p text:style-name="P5"/>
      <text:p text:style-name="P5"/>
      <text:p text:style-name="P5"><text:soft-page-break/></text:p>
      <text:p text:style-name="P8">- <text:span text:style-name="T1">Module Two;</text:span></text:p>
      <text:p text:style-name="P8"/>
      <text:p text:style-name="P9">The paradox of choice, a concept popularized by psychologist Barry Schwartz, suggests that more options can lead to less satisfaction. While the freedom to choose is fundamental to consumer culture, an overabundance of choices—from groceries to electronics—can overwhelm individuals, causing anxiety and decision fatigue. This paradox implies that the vast array of possibilities available today might actually diminish consumer contentment, as the fear of making the wrong choice looms large. Research supports this notion. In an experiment, psychologist Sheena Iyengar found that shoppers were more likely to purchase jam when offered 6 varieties instead of 24. The limited selection eased the decision process, reducing the pressure to find the ‘perfect’ option and making the experience more enjoyable. This phenomenon reveals that fewer choices can sometimes make consumers happier, which is a valuable insight for marketers and retailers aiming to boost satisfaction by curating their offerings. The paradox also has broader implications. In individualistic cultures, where personal choice is highly valued, the burden of decision-making can be significant. Conversely, collectivist cultures, which often provide fewer choices, report higher levels of contentment. This dynamic suggests that understanding cultural differences in consumer psychology can help businesses optimize their product strategies enhance overall well-being.</text:p>
      <text:p text:style-name="P9"/>
      <text:p text:style-name="P10">-<text:span text:style-name="T1">NOTE :</text:span></text:p>
      <text:p text:style-name="P9"/>
      <text:p text:style-name="P9"/>
      <text:p text:style-name="P9"/>
      <text:p text:style-name="P9"/>
      <text:p text:style-name="P9"/>
      <text:p text:style-name="P9"/>
      <text:p text:style-name="P9"/>
      <text:p text:style-name="P9"/>
      <text:p text:style-name="P9"/>
      <text:p text:style-name="P11"><text:soft-page-break/><text:span text:style-name="T1">1) </text:span>Which of the following best states a main idea of the passage?</text:p>
      <text:p text:style-name="P12"/>
      <text:p text:style-name="P12">- Effective marketing strategies focus on increasing product options.</text:p>
      <text:p text:style-name="P12">- Modern consumer culture is driven by a demand for fewer products.</text:p>
      <text:p text:style-name="P12">- Individualism enhances consumer contentment.</text:p>
      <text:p text:style-name="P12">- Limiting consumer choices can lead to higher satisfaction.</text:p>
      <text:p text:style-name="P12"/>
      <text:p text:style-name="P11"><text:span text:style-name="T1">2) </text:span>What is one effect of decision fatigue as mentioned in the passage?</text:p>
      <text:p text:style-name="P12"/>
      <text:p text:style-name="P13">- Desire to make the same choices as other consumers</text:p>
      <text:p text:style-name="P13">- Anxiety about making the wrong choice</text:p>
      <text:p text:style-name="P13">- Preference for consumer cultures</text:p>
      <text:p text:style-name="P12">- Enhanced freedom to choose</text:p>
      <text:p text:style-name="P12"/>
      <text:p text:style-name="P11"><text:span text:style-name="T1">3) </text:span>Why does the author mention Sheena lyengar’s experiment?</text:p>
      <text:p text:style-name="P12"/>
      <text:p text:style-name="P12">- To highlight the effectiveness of marketing strategies</text:p>
      <text:p text:style-name="P12">- To explain the methodology used in consumer psychology</text:p>
      <text:p text:style-name="P12">- To provide evidence supporting the paradox of choice</text:p>
      <text:p text:style-name="P12">- To criticize the abundance of products in modern markets</text:p>
      <text:p text:style-name="P12"/>
      <text:p text:style-name="P11"><text:span text:style-name="T1">4) </text:span>The word “curating” in the passage is closest in meaning to</text:p>
      <text:p text:style-name="P12"/>
      <text:p text:style-name="P12">- eliminating</text:p>
      <text:p text:style-name="P13">- organizing</text:p>
      <text:p text:style-name="P13">- increasing</text:p>
      <text:p text:style-name="P12">- changing</text:p>
      <text:p text:style-name="P12"/>
      <text:p text:style-name="P11"><text:span text:style-name="T1">5) </text:span>What can be inferred about consumers in collectivist cultures?</text:p>
      <text:p text:style-name="P12"/>
      <text:p text:style-name="P12">- They tend to report lower levels of satisfaction.</text:p>
      <text:p text:style-name="P12">- They are more affected by the paradox of choice.</text:p>
      <text:p text:style-name="P12">- They generally have fewer choices available.</text:p>
      <text:p text:style-name="P12">- They prefer individual decision-making.</text:p>
      <text:p text:style-name="P12"/>
      <text:p text:style-name="P12"/>
      <text:p text:style-name="P12"/>
      <text:p text:style-name="P14"/>
      <text:p text:style-name="P15"><text:soft-page-break/>- Sample 2 (ETS)</text:p>
      <text:p text:style-name="P15">- Module 1</text:p>
      <text:p text:style-name="P16"/>
      <text:p text:style-name="P11">The Impact of Sports on Social Integration</text:p>
      <text:p text:style-name="P12"/>
      <text:p text:style-name="P12">Sports can promote social integration by bridging gaps between people of various backgrounds. Participation in sports can lead to increased social cohesion and improved relationships among diverse groups.</text:p>
      <text:p text:style-name="P12"/>
      <text:p text:style-name="P12">For example, community soccer leagues often bring together people from different ethnicities, creating an environment where cultural differences are celebrated and mutual respect is cultivated. However, the impact of sports on social integration is not without challenges. Competitive environments can sometimes exacerbate social tensions, particularly when favoritism or exclusionary practices are present.</text:p>
      <text:p text:style-name="P12"/>
      <text:p text:style-name="P12">Despite these issues, many initiatives aim to use sports as a platform for social change. One such initiative is the Sport for Peace program, which focuses on conflict resolution through team-building activities and collaborative sports events. The role of sports in social integration extends beyond participation. Spectatorship and fandom also play significant roles in uniting people. Major international sports events like the Olympics or the World Cup serve as opportunities for nations to come together and share common goals. The visibility of athletes from diverse backgrounds during these events fosters a sense of global harmony. These events often highlight stories of athletes overcoming adversity, inspiring spectators and fostering a collective sense of achievemen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7"><text:soft-page-break/><text:span text:style-name="T2">1) </text:span><text:span text:style-name="T3">The word “cohesion” in the passage is closest in meaning to</text:span></text:p>
      <text:p text:style-name="P12">- diversity</text:p>
      <text:p text:style-name="P12">- awareness</text:p>
      <text:p text:style-name="P12">- unity</text:p>
      <text:p text:style-name="P12">- celebration</text:p>
      <text:p text:style-name="P12"/>
      <text:p text:style-name="P17"><text:span text:style-name="T2">2) </text:span><text:span text:style-name="T3">In which of the following situations can sports have an especially negative impact on social integration?</text:span></text:p>
      <text:p text:style-name="P18">- When people from different ethnicities are brought together</text:p>
      <text:p text:style-name="P19">- When participants are unreasonably strict about the rules of competition</text:p>
      <text:p text:style-name="P19">- When the social environment is not favorable to competition</text:p>
      <text:p text:style-name="P18">- When social tensions are heightened by favoring or excluding certain participants</text:p>
      <text:p text:style-name="P18"/>
      <text:p text:style-name="P20"><text:span text:style-name="T2">3) </text:span><text:span text:style-name="T3">What is the relationship between paragraphs 2 and 3 ?</text:span></text:p>
      <text:p text:style-name="P18">- Paragraph 3 discusses ways of addressing a problem mentioned in paragraph 2.</text:p>
      <text:p text:style-name="P18">- Paragraph 3 contradicts a theory proposed in paragraph 2.</text:p>
      <text:p text:style-name="P18">- Paragraph 3 provides evidence for an idea presented in paragraph 2.</text:p>
      <text:p text:style-name="P18">- Paragraph 3 introduces a new challenge related to paragraph 2.</text:p>
      <text:p text:style-name="P18"/>
      <text:p text:style-name="P20"><text:span text:style-name="T2">4) </text:span><text:span text:style-name="T3">What does the passage suggest about the Sport for Peace program?</text:span></text:p>
      <text:p text:style-name="P18">- Its main goal is to eliminate favoritism in sports.</text:p>
      <text:p text:style-name="P18">- It primarily targets professional athletes.</text:p>
      <text:p text:style-name="P18">- It uses team-building exercises to address conflicts.</text:p>
      <text:p text:style-name="P18">- It is only effective in local communities.</text:p>
      <text:p text:style-name="P21"/>
      <text:p text:style-name="P20"><text:span text:style-name="T2">5) </text:span><text:span text:style-name="T3">Why does the author mention major international sports events like the Olympics and the World Cup?</text:span></text:p>
      <text:p text:style-name="P18">- To argue that these events have little impact on social integration</text:p>
      <text:p text:style-name="P18">- To illustrate how sports can unite people globally</text:p>
      <text:p text:style-name="P18">- To suggest that these events mainly benefit athletes</text:p>
      <text:p text:style-name="P18">- To highlight the competitive nature of these events</text:p>
      <text:p text:style-name="P18"/>
      <text:p text:style-name="P22">#NOTE</text:p>
      <text:p text:style-name="P22"/>
      <text:p text:style-name="P22"/>
      <text:p text:style-name="P22"/>
      <text:p text:style-name="P22"/>
      <text:p text:style-name="P22"/>
      <text:p text:style-name="P22"/>
      <text:p text:style-name="P22"/>
      <text:p text:style-name="P23"><text:soft-page-break/>- Sample 2 (ETS)</text:p>
      <text:p text:style-name="P23">- Module 2</text:p>
      <text:p text:style-name="P22"/>
      <text:p text:style-name="P22">The Human Microbiome</text:p>
      <text:p text:style-name="P22"/>
      <text:p text:style-name="P24">The human microbiome consists of trillions of microorganisms living in and on our bodies. These include bacteria, viruses, fungi, and other microbes. They play a pivotal role in functions such as digestion, immunity, and mood regulation. For instance, gut bacteria help break down food and produce essential vitamins.</text:p>
      <text:p text:style-name="P24"/>
      <text:p text:style-name="P24">Recent studies show that the microbiome can be influenced by diet, lifestyle, and medication. Antibiotics, while effective against harmful bacteria, can disrupt the balance of beneficial microbes. This disruption can lead to health issues like digestive problems and weakened immunity. Researchers are exploring the connection between the microbiome and mental health. Certain gut bacteria produce neurotransmitters affecting brain function. An imbalance in these bacteria may be linked to conditions like depression and anxiety.</text:p>
      <text:p text:style-name="P24"/>
      <text:p text:style-name="P24">Maintaining a healthy microbiome involves eating a varied diet rich in fiber, reducing stress, and avoiding unnecessary antibiotics. Bacteria that aid digestion, known as robiotics and prebiotics, are also beneficial. As understanding of the microbiome grows, it may lead to breakthroughs in treating diseases and improving health.</text:p>
      <text:p text:style-name="P24"/>
      <text:p text:style-name="P22">#NOTE</text:p>
      <text:p text:style-name="P22"/>
      <text:p text:style-name="P22"/>
      <text:p text:style-name="P2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text:soft-page-break/>1) The word “pivotal” in the passage is closest in meaning to</text:p>
      <text:p text:style-name="P24">- very important</text:p>
      <text:p text:style-name="P24">- possible</text:p>
      <text:p text:style-name="P24">- combined</text:p>
      <text:p text:style-name="P24">- unwelcome </text:p>
      <text:p text:style-name="P24"/>
      <text:p text:style-name="P22">2) What is one way antibiotics can affect humans?</text:p>
      <text:p text:style-name="P24">- They enhance the production of neurotransmitters.</text:p>
      <text:p text:style-name="P24">- They can weaken immunity by harming beneficial microbes.</text:p>
      <text:p text:style-name="P24">- They can help relieve digestive problems.</text:p>
      <text:p text:style-name="P24">- They make it easier to produce essential vitamins.</text:p>
      <text:p text:style-name="P24"/>
      <text:p text:style-name="P22">3) What connection are researchers exploring regarding the microbiome?</text:p>
      <text:p text:style-name="P24">- The link between gut bacteria and immunity</text:p>
      <text:p text:style-name="P24">- The role of fungi in mood regulation</text:p>
      <text:p text:style-name="P24">- The role of viruses in digestion</text:p>
      <text:p text:style-name="P24">- The link between gut bacteria and mental health</text:p>
      <text:p text:style-name="P24"/>
      <text:p text:style-name="P22">4) All of the following help to maintain a healthy microbiome EXCEPT</text:p>
      <text:p text:style-name="P24">- eating a varied diet rich in fiber</text:p>
      <text:p text:style-name="P24">- lowering stress levels</text:p>
      <text:p text:style-name="P24">- avoiding sources of bacteria</text:p>
      <text:p text:style-name="P24">- reducing the use of antibiotics</text:p>
      <text:p text:style-name="P24"/>
      <text:p text:style-name="P22">5) What is the relationship between paragraphs 2 and 3 ?</text:p>
      <text:p text:style-name="P24">- Paragraph 3 challenges the ideas proposed in paragraph 2.</text:p>
      <text:p text:style-name="P24">- Paragraph 3 provides examples of the disruptions mentioned in paragraph 2.</text:p>
      <text:p text:style-name="P25">- Paragraph 3 specifies how to achieve a healthy microbiome based on the factors <text:s text:c="5"/></text:p>
      <text:p text:style-name="P25">mentioned in paragraph 2.</text:p>
      <text:p text:style-name="P24">- Paragraph 3 elaborates on the benefits of antibiotics mentioned in paragraph 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adea" svg:font-family="Calade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iransans" svg:font-family="iransan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3T00:51:19.967530358</meta:creation-date>
    <dc:date>2026-07-04T09:38:39.227103536</dc:date>
    <meta:editing-duration>PT39M58S</meta:editing-duration>
    <meta:editing-cycles>3</meta:editing-cycles>
    <meta:generator>LibreOffice/26.2.4.2$Linux_X86_64 LibreOffice_project/620$Build-2</meta:generator>
    <meta:print-date>2026-07-04T09:38:16.091822179</meta:print-date>
    <meta:document-statistic meta:table-count="0" meta:image-count="0" meta:object-count="0" meta:page-count="8" meta:paragraph-count="122" meta:word-count="1620" meta:character-count="10224" meta:non-whitespace-character-count="8721"/>
  </office:meta>
</office:document-meta>
</file>